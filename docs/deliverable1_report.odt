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B0000031A077A3E1E06CAF0D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paragraph-rsid="001fb089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>
      <style:text-properties officeooo:paragraph-rsid="001fb089"/>
    </style:style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0">
      <style:text-properties officeooo:paragraph-rsid="001fb089"/>
    </style:style>
    <style:style style:name="P35" style:family="paragraph" style:parent-style-name="Text_20_body" style:list-style-name="L31"/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DELIVERABLE 1 — PROJECT FOUNDATION COMPLETION REPORT</text:p>
      <text:p text:style-name="Text_20_body">Overview</text:p>
      <text:p text:style-name="Text_20_body">This phase established the complete foundational architecture for the Resume Builder &amp; Checker application. The objective was to create a fully functional full-stack environment that supports future feature development, including authentication, resume management, and AI-powered analysis.</text:p>
      <text:p text:style-name="Text_20_body">The result is a working system with a connected frontend, backend, and database, along with a scalable project structure designed for long-term maintainability.</text:p>
      <text:p text:style-name="Text_20_body">System Architecture</text:p>
      <text:p text:style-name="Text_20_body">The application follows a standard full-stack architecture:</text:p>
      <text:p text:style-name="Text_20_body">React Frontend (Vite + TypeScript)<text:line-break/>↓<text:line-break/>Axios + TanStack Query<text:line-break/>↓<text:line-break/>FastAPI Backend (Python)<text:line-break/>↓<text:line-break/>SQLAlchemy ORM<text:line-break/>↓<text:line-break/>PostgreSQL Database</text:p>
      <text:p text:style-name="Text_20_body">This structure separates concerns between presentation, business logic, and data persistence, ensuring scalability and maintainability.</text:p>
      <text:p text:style-name="Text_20_body">Backend Setup (FastAPI)</text:p>
      <text:p text:style-name="Text_20_body">The backend was initialized using FastAPI and structured for modular development. Key components include:</text:p>
      <text:list xml:id="list216126552" text:style-name="L21">
        <text:list-item>
          <text:p text:style-name="P24">FastAPI application initialized and configured</text:p>
        </text:list-item>
        <text:list-item>
          <text:p text:style-name="P24">Uvicorn development server successfully running</text:p>
        </text:list-item>
        <text:list-item>
          <text:p text:style-name="P24">Project folder structure organized for scalability</text:p>
        </text:list-item>
        <text:list-item>
          <text:p text:style-name="P24">REST API base endpoints implemented</text:p>
        </text:list-item>
        <text:list-item>
          <text:p text:style-name="P24">Health check endpoint created and validated</text:p>
        </text:list-item>
        <text:list-item>
          <text:p text:style-name="P24">PostgreSQL database created and connected successfully</text:p>
        </text:list-item>
        <text:list-item>
          <text:p text:style-name="P24">SQLAlchemy ORM configured for database interactions</text:p>
        </text:list-item>
        <text:list-item>
          <text:p text:style-name="P24">Session management implemented for database transactions</text:p>
        </text:list-item>
        <text:list-item>
          <text:p text:style-name="P24">Environment variables configured using a .env file</text:p>
        </text:list-item>
        <text:list-item>
          <text:p text:style-name="P24">Database connection securely loaded using python-dotenv</text:p>
        </text:list-item>
        <text:list-item>
          <text:p text:style-name="P24">Alembic initialized for future database migrations</text:p>
        </text:list-item>
        <text:list-item>
          <text:p text:style-name="P24"><text:soft-page-break/>Cross-Origin Resource Sharing (CORS) configured to enable frontend communication</text:p>
        </text:list-item>
      </text:list>
      <text:p text:style-name="Text_20_body">Verified backend endpoints include:</text:p>
      <text:list xml:id="list2990409691" text:style-name="L22">
        <text:list-item>
          <text:p text:style-name="P25">Root endpoint returning API status</text:p>
        </text:list-item>
        <text:list-item>
          <text:p text:style-name="P25">Database health check confirming successful database connection</text:p>
        </text:list-item>
        <text:list-item>
          <text:p text:style-name="P25">Swagger API documentation accessible via /docs</text:p>
        </text:list-item>
      </text:list>
      <text:p text:style-name="Text_20_body">Database Layer</text:p>
      <text:p text:style-name="Text_20_body">The database layer uses PostgreSQL as the primary data store with SQLAlchemy as the ORM.</text:p>
      <text:p text:style-name="Text_20_body">Completed tasks include:</text:p>
      <text:list xml:id="list462378911" text:style-name="L23">
        <text:list-item>
          <text:p text:style-name="P26">PostgreSQL database created and configured</text:p>
        </text:list-item>
        <text:list-item>
          <text:p text:style-name="P26">SQLAlchemy engine established</text:p>
        </text:list-item>
        <text:list-item>
          <text:p text:style-name="P26">SessionLocal configured for database sessions</text:p>
        </text:list-item>
        <text:list-item>
          <text:p text:style-name="P26">Base model configured for ORM mappings</text:p>
        </text:list-item>
        <text:list-item>
          <text:p text:style-name="P26">Environment-based configuration implemented for secure credential management</text:p>
        </text:list-item>
        <text:list-item>
          <text:p text:style-name="P26">Alembic migration system initialized (no migrations created yet)</text:p>
        </text:list-item>
      </text:list>
      <text:p text:style-name="Text_20_body">Frontend Setup (React)</text:p>
      <text:p text:style-name="Text_20_body">The frontend was created using Vite with React and TypeScript, providing a modern development environment.</text:p>
      <text:p text:style-name="Text_20_body">Completed tasks include:</text:p>
      <text:list xml:id="list3732889605" text:style-name="L24">
        <text:list-item>
          <text:p text:style-name="P27">React + Vite + TypeScript project initialized</text:p>
        </text:list-item>
        <text:list-item>
          <text:p text:style-name="P27">Tailwind CSS configured for styling</text:p>
        </text:list-item>
        <text:list-item>
          <text:p text:style-name="P27">Scalable frontend folder structure established</text:p>
        </text:list-item>
        <text:list-item>
          <text:p text:style-name="P27">React Router configured for navigation</text:p>
        </text:list-item>
        <text:list-item>
          <text:p text:style-name="P27">Core pages created (Home, Login, Register, Test API page)</text:p>
        </text:list-item>
        <text:list-item>
          <text:p text:style-name="P27">Routing system implemented and validated</text:p>
        </text:list-item>
      </text:list>
      <text:p text:style-name="Text_20_body">Frontend folder structure is organized as follows:</text:p>
      <text:p text:style-name="Text_20_body">src/</text:p>
      <text:list xml:id="list2599121829" text:style-name="L25">
        <text:list-item>
          <text:p text:style-name="P28">api/</text:p>
        </text:list-item>
        <text:list-item>
          <text:p text:style-name="P28">components/</text:p>
        </text:list-item>
        <text:list-item>
          <text:p text:style-name="P28">features/</text:p>
        </text:list-item>
        <text:list-item>
          <text:p text:style-name="P28">hooks/</text:p>
        </text:list-item>
        <text:list-item>
          <text:p text:style-name="P28"><text:soft-page-break/>layouts/</text:p>
        </text:list-item>
        <text:list-item>
          <text:p text:style-name="P28">lib/</text:p>
        </text:list-item>
        <text:list-item>
          <text:p text:style-name="P28">pages/</text:p>
        </text:list-item>
        <text:list-item>
          <text:p text:style-name="P28">routes/</text:p>
        </text:list-item>
        <text:list-item>
          <text:p text:style-name="P28">styles/</text:p>
        </text:list-item>
        <text:list-item>
          <text:p text:style-name="P28">types/</text:p>
        </text:list-item>
        <text:list-item>
          <text:p text:style-name="P28">utils/</text:p>
        </text:list-item>
      </text:list>
      <text:p text:style-name="Text_20_body">API Integration Layer</text:p>
      <text:p text:style-name="Text_20_body">The frontend includes a centralized API communication layer.</text:p>
      <text:p text:style-name="Text_20_body">Completed tasks include:</text:p>
      <text:list xml:id="list1885773900" text:style-name="L26">
        <text:list-item>
          <text:p text:style-name="P29">Axios configured for HTTP requests</text:p>
        </text:list-item>
        <text:list-item>
          <text:p text:style-name="P29">Centralized API client created</text:p>
        </text:list-item>
        <text:list-item>
          <text:p text:style-name="P29">Environment variable system implemented using Vite (.env)</text:p>
        </text:list-item>
        <text:list-item>
          <text:p text:style-name="P29">Backend base URL abstracted for deployment flexibility</text:p>
        </text:list-item>
      </text:list>
      <text:p text:style-name="Text_20_body">Data Fetching Layer</text:p>
      <text:p text:style-name="Text_20_body">State and server communication are managed using TanStack Query.</text:p>
      <text:p text:style-name="Text_20_body">Completed tasks include:</text:p>
      <text:list xml:id="list3142788790" text:style-name="L27">
        <text:list-item>
          <text:p text:style-name="P30">TanStack Query installed and configured</text:p>
        </text:list-item>
        <text:list-item>
          <text:p text:style-name="P30">QueryClient initialized</text:p>
        </text:list-item>
        <text:list-item>
          <text:p text:style-name="P30">QueryClientProvider wrapped around application</text:p>
        </text:list-item>
        <text:list-item>
          <text:p text:style-name="P30">React Query Devtools integrated for debugging and development visibility</text:p>
        </text:list-item>
      </text:list>
      <text:p text:style-name="Text_20_body">Full-Stack Integration</text:p>
      <text:p text:style-name="Text_20_body">The frontend and backend were successfully integrated and tested.</text:p>
      <text:p text:style-name="Text_20_body">Validation results:</text:p>
      <text:list xml:id="list2224081230" text:style-name="L28">
        <text:list-item>
          <text:p text:style-name="P31">Frontend successfully communicates with backend API</text:p>
        </text:list-item>
        <text:list-item>
          <text:p text:style-name="P31">Backend endpoint responses are correctly received and rendered in the frontend</text:p>
        </text:list-item>
        <text:list-item>
          <text:p text:style-name="P31">Environment variables are correctly applied</text:p>
        </text:list-item>
        <text:list-item>
          <text:p text:style-name="P31">CORS configuration verified and functioning correctly</text:p>
        </text:list-item>
      </text:list>
      <text:p text:style-name="Text_20_body">Test verification was performed using a dedicated frontend test route that calls the backend root endpoint and displays the response successfully.</text:p>
      <text:p text:style-name="Text_20_body"><text:soft-page-break/>Final Outcome</text:p>
      <text:p text:style-name="Text_20_body">Deliverable 1 is now complete. The system has a fully functional full-stack foundation with:</text:p>
      <text:list xml:id="list1260795179" text:style-name="L29">
        <text:list-item>
          <text:p text:style-name="P32">Working React frontend</text:p>
        </text:list-item>
        <text:list-item>
          <text:p text:style-name="P32">Working FastAPI backend</text:p>
        </text:list-item>
        <text:list-item>
          <text:p text:style-name="P32">Connected PostgreSQL database</text:p>
        </text:list-item>
        <text:list-item>
          <text:p text:style-name="P32">Verified API communication between frontend and backend</text:p>
        </text:list-item>
        <text:list-item>
          <text:p text:style-name="P32">Scalable and modular project architecture</text:p>
        </text:list-item>
        <text:list-item>
          <text:p text:style-name="P32">Development tooling configured for both frontend and backend</text:p>
        </text:list-item>
      </text:list>
      <text:p text:style-name="Text_20_body">The project is now ready for the implementation of core features, including authentication, resume creation, and AI-based resume analysis.</text:p>
      <text:p text:style-name="Text_20_body">Next Phase</text:p>
      <text:p text:style-name="Text_20_body">The next development phase will focus on implementing core application features, including:</text:p>
      <text:list xml:id="list1466594208" text:style-name="L30">
        <text:list-item>
          <text:p text:style-name="P33">User authentication system using JWT</text:p>
        </text:list-item>
        <text:list-item>
          <text:p text:style-name="P33">User registration and login functionality</text:p>
        </text:list-item>
        <text:list-item>
          <text:p text:style-name="P33">Protected routes and session management</text:p>
        </text:list-item>
        <text:list-item>
          <text:p text:style-name="P33">Resume CRUD operations</text:p>
        </text:list-item>
        <text:list-item>
          <text:p text:style-name="P33">Database migrations and schema expansion using Alembic</text:p>
        </text:list-item>
        <text:list-item>
          <text:p text:style-name="P34">Initial resume builder functionality</text:p>
        </text:list-item>
      </text:list>
      <text:p text:style-name="P23"><draw:frame draw:style-name="fr1" draw:name="Image1" text:anchor-type="char" svg:width="6.9252in" svg:height="5.8555in" draw:z-index="0"><draw:image xlink:href="Pictures/10000201000003AB0000031A077A3E1E06CAF0D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03T00:35:04.205000000</meta:creation-date>
    <dc:date>2026-07-03T01:47:20.574000000</dc:date>
    <meta:editing-duration>PT1M6S</meta:editing-duration>
    <meta:editing-cycles>1</meta:editing-cycles>
    <meta:generator>LibreOffice/7.0.3.1$Windows_X86_64 LibreOffice_project/d7547858d014d4cf69878db179d326fc3483e082</meta:generator>
    <meta:document-statistic meta:table-count="0" meta:image-count="1" meta:object-count="0" meta:page-count="5" meta:paragraph-count="96" meta:word-count="655" meta:character-count="4639" meta:non-whitespace-character-count="4141"/>
  </office:meta>
</office:document-meta>
</file>