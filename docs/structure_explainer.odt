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Geneva" fo:font-size="12pt" style:font-name-asian="Geneva" style:font-size-asian="12pt" style:font-name-complex="Geneva"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Geneva" fo:font-size="12pt" style:font-name-asian="Geneva" style:font-size-asian="12pt" style:font-name-complex="Geneva"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T1" style:family="text">
      <style:text-properties fo:color="#000000" loext:opacity="100%" style:font-name="Geneva" fo:font-size="12pt" style:font-name-asian="Geneva" style:font-size-asian="12pt" style:font-name-complex="Genev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is a simplified version of the Git Flow branching strategy. The idea is that every branch has a specific purpose, so you never do all your work directly on main. <text:s/></text:p>
      <text:p text:style-name="P3"/>
      <text:p text:style-name="P3">main </text:p>
      <text:p text:style-name="P3"><text:s text:c="4"/>? </text:p>
      <text:p text:style-name="P3"><text:s text:c="4"/>??? feature/auth </text:p>
      <text:p text:style-name="P3"><text:s text:c="4"/>??? feature/dashboard </text:p>
      <text:p text:style-name="P3"><text:s text:c="4"/>??? feature/resume-builder </text:p>
      <text:p text:style-name="P3"><text:s text:c="4"/>??? feature/parser </text:p>
      <text:p text:style-name="P3"><text:s text:c="4"/>??? feature/ai </text:p>
      <text:p text:style-name="P3"/>
      <text:p text:style-name="P3">feature/auth </text:p>
      <text:p text:style-name="P3"/>
      <text:p text:style-name="P3">? </text:p>
      <text:p text:style-name="P3"/>
      <text:p text:style-name="P3">Pull Request </text:p>
      <text:p text:style-name="P3"/>
      <text:p text:style-name="P3">? </text:p>
      <text:p text:style-name="P3"/>
      <text:p text:style-name="P3">main </text:p>
      <text:p text:style-name="P3"/>
      <text:p text:style-name="P3">Since you're the only developer, a dedicated develop branch isn't strictly necessary. GitHub's Pull Requests still let you review changes, run automated checks (if you add them), and keep main clean. As the project grows or if collaborators join, introducing a develop branch becomes more valuable. <text:s/></text:p>
      <text:p text:style-name="P3"/>
      <text:p text:style-name="P3">and where will i put the front end and back end folders and branches? <text:s/></text:p>
      <text:p text:style-name="P3"/>
      <text:p text:style-name="P3">This is one of the first architectural decisions you'll make. For this project, I recommend using a monorepo, where both the frontend and backend live in the same Git repository. <text:s/></text:p>
      <text:p text:style-name="P3"/>
      <text:p text:style-name="P3">Your Git repository would look like this: <text:s/></text:p>
      <text:p text:style-name="P3"/>
      <text:p text:style-name="P3">resume-builder/ </text:p>
      <text:p text:style-name="P3">? </text:p>
      <text:p text:style-name="P3">??? frontend/ </text:p>
      <text:p text:style-name="P3">? <text:s text:c="2"/>??? src/ </text:p>
      <text:p text:style-name="P3">? <text:s text:c="2"/>??? public/ </text:p>
      <text:p text:style-name="P3">? <text:s text:c="2"/>??? package.json </text:p>
      <text:p text:style-name="P3">? <text:s text:c="2"/>??? ... </text:p>
      <text:p text:style-name="P3">? </text:p>
      <text:p text:style-name="P3">??? backend/ </text:p>
      <text:p text:style-name="P3">? <text:s text:c="2"/>??? app/ </text:p>
      <text:p text:style-name="P3">? <text:s text:c="2"/>??? tests/ </text:p>
      <text:p text:style-name="P3">? <text:s text:c="2"/>??? requirements.txt </text:p>
      <text:p text:style-name="P3">? <text:s text:c="2"/>??? ... </text:p>
      <text:p text:style-name="P3"><text:soft-page-break/>? </text:p>
      <text:p text:style-name="P3">??? docs/ </text:p>
      <text:p text:style-name="P3">? <text:s text:c="2"/>??? roadmap.md </text:p>
      <text:p text:style-name="P3">? <text:s text:c="2"/>??? sitemap.md </text:p>
      <text:p text:style-name="P3">? <text:s text:c="2"/>??? api-spec.md </text:p>
      <text:p text:style-name="P3">? <text:s text:c="2"/>??? ... </text:p>
      <text:p text:style-name="P3">? </text:p>
      <text:p text:style-name="P3">??? .gitignore </text:p>
      <text:p text:style-name="P3">??? README.md </text:p>
      <text:p text:style-name="P3">??? LICENSE </text:p>
      <text:p text:style-name="P3"/>
      <text:p text:style-name="P3">Notice there's only one .git folder at the root. <text:s/></text:p>
      <text:p text:style-name="P3"/>
      <text:p text:style-name="P3">What I Recommend for This Project <text:s/></text:p>
      <text:p text:style-name="P3"/>
      <text:p text:style-name="P3">resume-builder/ </text:p>
      <text:p text:style-name="P3">? </text:p>
      <text:p text:style-name="P3">??? frontend/ </text:p>
      <text:p text:style-name="P3">??? backend/ </text:p>
      <text:p text:style-name="P3">??? docs/ </text:p>
      <text:p text:style-name="P3">??? docker/ </text:p>
      <text:p text:style-name="P3">??? scripts/ </text:p>
      <text:p text:style-name="P3">??? README.md </text:p>
      <text:p text:style-name="P3">??? docker-compose.yml </text:p>
      <text:p text:style-name="P3">??? .gitignore </text:p>
      <text:p text:style-name="P3"/>
      <text:p text:style-name="P3">One repository. </text:p>
      <text:p text:style-name="P3">One set of branches. </text:p>
      <text:p text:style-name="P3">Branches organized by feature rather than by frontend/backend. </text:p>
      <text:p text:style-name="P3">This is how many professional teams organize full-stack applications because it keeps all the code needed for a feature together and makes changes easier to review and understand. </text:p>
      <text:p text:style-name="P3">The key thing to understand is that folders and branches are two completely different concepts. </text:p>
      <text:p text:style-name="P1"><text:span text:style-name="T1"><text:s text:c="4"/>Folders organize your files. <text:s/></text:span></text:p>
      <text:p text:style-name="P1"><text:span text:style-name="T1"><text:s text:c="4"/>Branches organize your project's history. </text:span></text:p>
      <text:p text:style-name="P3">They don't contain each other. <text:s/></text:p>
      <text:p text:style-name="P3"/>
      <text:p text:style-name="P3">Think of it like a video game save file </text:p>
      <text:p text:style-name="P3">Imagine your project is a game world. </text:p>
      <text:p text:style-name="P3">The folders are the world itself: </text:p>
      <text:p text:style-name="P3">resume-builder/ </text:p>
      <text:p text:style-name="P3">? </text:p>
      <text:p text:style-name="P3">??? frontend/ </text:p>
      <text:p text:style-name="P3">??? backend/ </text:p>
      <text:p text:style-name="P3">??? docs/ </text:p>
      <text:p text:style-name="P3"><text:soft-page-break/>??? ... </text:p>
      <text:p text:style-name="P3">The branches are different save files of that world. </text:p>
      <text:p text:style-name="P3">Save 1: main </text:p>
      <text:p text:style-name="P3">Save 2: feature/auth </text:p>
      <text:p text:style-name="P3">Save 3: feature/parser </text:p>
      <text:p text:style-name="P3">Save 4: feature/ai </text:p>
      <text:p text:style-name="P3">Each save contains the entire world, but in a different state. </text:p>
      <text:p text:style-name="P3">Your Repository </text:p>
      <text:p text:style-name="P3">On your computer you'll literally have this: </text:p>
      <text:p text:style-name="P3">resume-builder/ </text:p>
      <text:p text:style-name="P3">? </text:p>
      <text:p text:style-name="P3">??? frontend/ </text:p>
      <text:p text:style-name="P3">??? backend/ </text:p>
      <text:p text:style-name="P3">??? docs/ </text:p>
      <text:p text:style-name="P3">??? docker/ </text:p>
      <text:p text:style-name="P3">??? scripts/ </text:p>
      <text:p text:style-name="P3">??? README.md </text:p>
      <text:p text:style-name="P3">??? .git/ </text:p>
      <text:p text:style-name="P3">Notice the hidden .git folder. </text:p>
      <text:p text:style-name="P3">That folder stores all the branch information. </text:p>
      <text:p text:style-name="P3">It might look conceptually like this: </text:p>
      <text:p text:style-name="P3">resume-builder/ </text:p>
      <text:p text:style-name="P3">? </text:p>
      <text:p text:style-name="P3">??? frontend/ </text:p>
      <text:p text:style-name="P3">??? backend/ </text:p>
      <text:p text:style-name="P3">??? docs/ </text:p>
      <text:p text:style-name="P3">??? .git/ </text:p>
      <text:p text:style-name="P3">? <text:s text:c="4"/>??? main </text:p>
      <text:p text:style-name="P3">? <text:s text:c="4"/>??? develop </text:p>
      <text:p text:style-name="P3">? <text:s text:c="4"/>??? feature/auth </text:p>
      <text:p text:style-name="P3">? <text:s text:c="4"/>??? feature/dashboard </text:p>
      <text:p text:style-name="P3">? <text:s text:c="4"/>??? feature/parser </text:p>
      <text:p text:style-name="P3">? <text:s text:c="4"/>??? ... </text:p>
      <text:p text:style-name="P3">You normally never touch .git directly. </text:p>
      <text:p text:style-name="P3">When you switch branches... </text:p>
      <text:p text:style-name="P3">Suppose you're on main. </text:p>
      <text:p text:style-name="P3">Your project looks like this: </text:p>
      <text:p text:style-name="P3">resume-builder/ </text:p>
      <text:p text:style-name="P3">frontend/ </text:p>
      <text:p text:style-name="P3">backend/ </text:p>
      <text:p text:style-name="P3">docs/ </text:p>
      <text:p text:style-name="P3">Now run: </text:p>
      <text:p text:style-name="P3">git checkout feature/auth </text:p>
      <text:p text:style-name="P3">Your folders stay exactly the same. </text:p>
      <text:p text:style-name="P3">resume-builder/ </text:p>
      <text:p text:style-name="P3">frontend/ </text:p>
      <text:p text:style-name="P3"><text:soft-page-break/>backend/ </text:p>
      <text:p text:style-name="P3">docs/ </text:p>
      <text:p text:style-name="P3">What changes is the contents inside those folders. </text:p>
      <text:p text:style-name="P3">Here's the big picture <text:s/></text:p>
      <text:p text:style-name="P3">Repository </text:p>
      <text:p text:style-name="P3">? </text:p>
      <text:p text:style-name="P3">??? Branches </text:p>
      <text:p text:style-name="P3">? <text:s text:c="5"/>? </text:p>
      <text:p text:style-name="P3">? <text:s text:c="5"/>??? main </text:p>
      <text:p text:style-name="P3">? <text:s text:c="5"/>??? develop </text:p>
      <text:p text:style-name="P3">? <text:s text:c="5"/>??? feature/auth </text:p>
      <text:p text:style-name="P3">? <text:s text:c="5"/>??? feature/parser </text:p>
      <text:p text:style-name="P3">? <text:s text:c="5"/>??? feature/ai </text:p>
      <text:p text:style-name="P3">? </text:p>
      <text:p text:style-name="P3">??? Files </text:p>
      <text:p text:style-name="P3"><text:s text:c="6"/>? </text:p>
      <text:p text:style-name="P3"><text:s text:c="6"/>??? frontend/ </text:p>
      <text:p text:style-name="P3"><text:s text:c="6"/>??? backend/ </text:p>
      <text:p text:style-name="P3"><text:s text:c="6"/>??? docs/ </text:p>
      <text:p text:style-name="P3"><text:s text:c="6"/>??? docker/ </text:p>
      <text:p text:style-name="P3"><text:s text:c="6"/>??? scripts/ </text:p>
      <text:p text:style-name="P3"/>
      <text:p text:style-name="P3">Frontend Structure (React + TypeScript + Vite) <text:s/></text:p>
      <text:p text:style-name="P3"/>
      <text:p text:style-name="P3">frontend/ </text:p>
      <text:p text:style-name="P3">? </text:p>
      <text:p text:style-name="P3">??? public/ </text:p>
      <text:p text:style-name="P3">? </text:p>
      <text:p text:style-name="P3">??? src/ </text:p>
      <text:p text:style-name="P3">? <text:s text:c="2"/>? </text:p>
      <text:p text:style-name="P3">? <text:s text:c="2"/>??? assets/ </text:p>
      <text:p text:style-name="P3">? <text:s text:c="2"/>? <text:s text:c="2"/>??? images/ </text:p>
      <text:p text:style-name="P3">? <text:s text:c="2"/>? <text:s text:c="2"/>??? icons/ </text:p>
      <text:p text:style-name="P3">? <text:s text:c="2"/>? <text:s text:c="2"/>??? fonts/ </text:p>
      <text:p text:style-name="P3">? <text:s text:c="2"/>? </text:p>
      <text:p text:style-name="P3">? <text:s text:c="2"/>??? components/ </text:p>
      <text:p text:style-name="P3">? <text:s text:c="2"/>? <text:s text:c="2"/>??? common/ </text:p>
      <text:p text:style-name="P3">? <text:s text:c="2"/>? <text:s text:c="2"/>? <text:s text:c="2"/>??? Button.tsx </text:p>
      <text:p text:style-name="P3">? <text:s text:c="2"/>? <text:s text:c="2"/>? <text:s text:c="2"/>??? Card.tsx </text:p>
      <text:p text:style-name="P3">? <text:s text:c="2"/>? <text:s text:c="2"/>? <text:s text:c="2"/>??? Input.tsx </text:p>
      <text:p text:style-name="P3">? <text:s text:c="2"/>? <text:s text:c="2"/>? <text:s text:c="2"/>??? Modal.tsx </text:p>
      <text:p text:style-name="P3">? <text:s text:c="2"/>? <text:s text:c="2"/>? <text:s text:c="2"/>??? Spinner.tsx </text:p>
      <text:p text:style-name="P3">? <text:s text:c="2"/>? <text:s text:c="2"/>? </text:p>
      <text:p text:style-name="P3">? <text:s text:c="2"/>? <text:s text:c="2"/>??? layout/ </text:p>
      <text:p text:style-name="P3">? <text:s text:c="2"/>? <text:s text:c="2"/>? <text:s text:c="2"/>??? Navbar.tsx </text:p>
      <text:p text:style-name="P3">? <text:s text:c="2"/>? <text:s text:c="2"/>? <text:s text:c="2"/>??? Sidebar.tsx </text:p>
      <text:p text:style-name="P3"><text:soft-page-break/>? <text:s text:c="2"/>? <text:s text:c="2"/>? <text:s text:c="2"/>??? Footer.tsx </text:p>
      <text:p text:style-name="P3">? <text:s text:c="2"/>? <text:s text:c="2"/>? <text:s text:c="2"/>??? DashboardLayout.tsx </text:p>
      <text:p text:style-name="P3">? <text:s text:c="2"/>? <text:s text:c="2"/>? </text:p>
      <text:p text:style-name="P3">? <text:s text:c="2"/>? <text:s text:c="2"/>??? resume/ </text:p>
      <text:p text:style-name="P3">? <text:s text:c="2"/>? <text:s text:c="2"/>? <text:s text:c="2"/>??? ResumeEditor.tsx </text:p>
      <text:p text:style-name="P3">? <text:s text:c="2"/>? <text:s text:c="2"/>? <text:s text:c="2"/>??? ResumePreview.tsx </text:p>
      <text:p text:style-name="P3">? <text:s text:c="2"/>? <text:s text:c="2"/>? <text:s text:c="2"/>??? ExperienceForm.tsx </text:p>
      <text:p text:style-name="P3">? <text:s text:c="2"/>? <text:s text:c="2"/>? <text:s text:c="2"/>??? EducationForm.tsx </text:p>
      <text:p text:style-name="P3">? <text:s text:c="2"/>? <text:s text:c="2"/>? <text:s text:c="2"/>??? SkillsForm.tsx </text:p>
      <text:p text:style-name="P3">? <text:s text:c="2"/>? <text:s text:c="2"/>? <text:s text:c="2"/>??? ProjectsForm.tsx </text:p>
      <text:p text:style-name="P3">? <text:s text:c="2"/>? <text:s text:c="2"/>? </text:p>
      <text:p text:style-name="P3">? <text:s text:c="2"/>? <text:s text:c="2"/>??? checker/ </text:p>
      <text:p text:style-name="P3">? <text:s text:c="2"/>? <text:s text:c="2"/>? <text:s text:c="2"/>??? UploadResume.tsx </text:p>
      <text:p text:style-name="P3">? <text:s text:c="2"/>? <text:s text:c="2"/>? <text:s text:c="2"/>??? ScoreCard.tsx </text:p>
      <text:p text:style-name="P3">? <text:s text:c="2"/>? <text:s text:c="2"/>? <text:s text:c="2"/>??? Suggestions.tsx </text:p>
      <text:p text:style-name="P3">? <text:s text:c="2"/>? <text:s text:c="2"/>? <text:s text:c="2"/>??? ATSResults.tsx </text:p>
      <text:p text:style-name="P3">? <text:s text:c="2"/>? <text:s text:c="2"/>? </text:p>
      <text:p text:style-name="P3">? <text:s text:c="2"/>? <text:s text:c="2"/>??? dashboard/ </text:p>
      <text:p text:style-name="P3">? <text:s text:c="2"/>? <text:s text:c="6"/>??? ResumeCard.tsx </text:p>
      <text:p text:style-name="P3">? <text:s text:c="2"/>? <text:s text:c="6"/>??? Statistics.tsx </text:p>
      <text:p text:style-name="P3">? <text:s text:c="2"/>? <text:s text:c="6"/>??? RecentActivity.tsx </text:p>
      <text:p text:style-name="P3">? <text:s text:c="2"/>? </text:p>
      <text:p text:style-name="P3">? <text:s text:c="2"/>??? pages/ </text:p>
      <text:p text:style-name="P3">? <text:s text:c="2"/>? <text:s text:c="2"/>??? Landing.tsx </text:p>
      <text:p text:style-name="P3">? <text:s text:c="2"/>? <text:s text:c="2"/>??? Login.tsx </text:p>
      <text:p text:style-name="P3">? <text:s text:c="2"/>? <text:s text:c="2"/>??? Register.tsx </text:p>
      <text:p text:style-name="P3">? <text:s text:c="2"/>? <text:s text:c="2"/>??? Dashboard.tsx </text:p>
      <text:p text:style-name="P3">? <text:s text:c="2"/>? <text:s text:c="2"/>??? ResumeBuilder.tsx </text:p>
      <text:p text:style-name="P3">? <text:s text:c="2"/>? <text:s text:c="2"/>??? ResumeChecker.tsx </text:p>
      <text:p text:style-name="P3">? <text:s text:c="2"/>? <text:s text:c="2"/>??? ATSChecker.tsx </text:p>
      <text:p text:style-name="P3">? <text:s text:c="2"/>? <text:s text:c="2"/>??? Templates.tsx </text:p>
      <text:p text:style-name="P3">? <text:s text:c="2"/>? <text:s text:c="2"/>??? Profile.tsx </text:p>
      <text:p text:style-name="P3">? <text:s text:c="2"/>? <text:s text:c="2"/>??? Settings.tsx </text:p>
      <text:p text:style-name="P3">? <text:s text:c="2"/>? </text:p>
      <text:p text:style-name="P3">? <text:s text:c="2"/>??? hooks/ </text:p>
      <text:p text:style-name="P3">? <text:s text:c="2"/>? <text:s text:c="2"/>??? useAuth.ts </text:p>
      <text:p text:style-name="P3">? <text:s text:c="2"/>? <text:s text:c="2"/>??? useResume.ts </text:p>
      <text:p text:style-name="P3">? <text:s text:c="2"/>? <text:s text:c="2"/>??? useTheme.ts </text:p>
      <text:p text:style-name="P3">? <text:s text:c="2"/>? </text:p>
      <text:p text:style-name="P3">? <text:s text:c="2"/>??? services/ </text:p>
      <text:p text:style-name="P3">? <text:s text:c="2"/>? <text:s text:c="2"/>??? api.ts </text:p>
      <text:p text:style-name="P3">? <text:s text:c="2"/>? <text:s text:c="2"/>??? authService.ts </text:p>
      <text:p text:style-name="P3">? <text:s text:c="2"/>? <text:s text:c="2"/>??? resumeService.ts </text:p>
      <text:p text:style-name="P3">? <text:s text:c="2"/>? <text:s text:c="2"/>??? checkerService.ts </text:p>
      <text:p text:style-name="P3">? <text:s text:c="2"/>? <text:s text:c="2"/>??? atsService.ts </text:p>
      <text:p text:style-name="P3">? <text:s text:c="2"/>? </text:p>
      <text:p text:style-name="P3"><text:soft-page-break/>? <text:s text:c="2"/>??? context/ </text:p>
      <text:p text:style-name="P3">? <text:s text:c="2"/>? <text:s text:c="2"/>??? AuthContext.tsx </text:p>
      <text:p text:style-name="P3">? <text:s text:c="2"/>? <text:s text:c="2"/>??? ThemeContext.tsx </text:p>
      <text:p text:style-name="P3">? <text:s text:c="2"/>? </text:p>
      <text:p text:style-name="P3">? <text:s text:c="2"/>??? types/ </text:p>
      <text:p text:style-name="P3">? <text:s text:c="2"/>? <text:s text:c="2"/>??? user.ts </text:p>
      <text:p text:style-name="P3">? <text:s text:c="2"/>? <text:s text:c="2"/>??? resume.ts </text:p>
      <text:p text:style-name="P3">? <text:s text:c="2"/>? <text:s text:c="2"/>??? api.ts </text:p>
      <text:p text:style-name="P3">? <text:s text:c="2"/>? </text:p>
      <text:p text:style-name="P3">? <text:s text:c="2"/>??? utils/ </text:p>
      <text:p text:style-name="P3">? <text:s text:c="2"/>? <text:s text:c="2"/>??? validators.ts </text:p>
      <text:p text:style-name="P3">? <text:s text:c="2"/>? <text:s text:c="2"/>??? formatters.ts </text:p>
      <text:p text:style-name="P3">? <text:s text:c="2"/>? <text:s text:c="2"/>??? constants.ts </text:p>
      <text:p text:style-name="P3">? <text:s text:c="2"/>? </text:p>
      <text:p text:style-name="P3">? <text:s text:c="2"/>??? styles/ </text:p>
      <text:p text:style-name="P3">? <text:s text:c="2"/>? <text:s text:c="2"/>??? globals.css </text:p>
      <text:p text:style-name="P3">? <text:s text:c="2"/>? </text:p>
      <text:p text:style-name="P3">? <text:s text:c="2"/>??? App.tsx </text:p>
      <text:p text:style-name="P3">? <text:s text:c="2"/>??? main.tsx </text:p>
      <text:p text:style-name="P3">? <text:s text:c="2"/>??? routes.tsx </text:p>
      <text:p text:style-name="P3">? </text:p>
      <text:p text:style-name="P3">??? package.json </text:p>
      <text:p text:style-name="P3">??? tsconfig.json </text:p>
      <text:p text:style-name="P3">??? vite.config.ts </text:p>
      <text:p text:style-name="P3"/>
      <text:p text:style-name="P3">Backend Structure (FastAPI) <text:s/></text:p>
      <text:p text:style-name="P3"/>
      <text:p text:style-name="P3">backend/ </text:p>
      <text:p text:style-name="P3">? </text:p>
      <text:p text:style-name="P3">??? app/ </text:p>
      <text:p text:style-name="P3">? <text:s text:c="2"/>? </text:p>
      <text:p text:style-name="P3">? <text:s text:c="2"/>??? api/ </text:p>
      <text:p text:style-name="P3">? <text:s text:c="2"/>? <text:s text:c="2"/>??? auth.py </text:p>
      <text:p text:style-name="P3">? <text:s text:c="2"/>? <text:s text:c="2"/>??? users.py </text:p>
      <text:p text:style-name="P3">? <text:s text:c="2"/>? <text:s text:c="2"/>??? resumes.py </text:p>
      <text:p text:style-name="P3">? <text:s text:c="2"/>? <text:s text:c="2"/>??? upload.py </text:p>
      <text:p text:style-name="P3">? <text:s text:c="2"/>? <text:s text:c="2"/>??? checker.py </text:p>
      <text:p text:style-name="P3">? <text:s text:c="2"/>? <text:s text:c="2"/>??? ats.py </text:p>
      <text:p text:style-name="P3">? <text:s text:c="2"/>? <text:s text:c="2"/>??? ai.py </text:p>
      <text:p text:style-name="P3">? <text:s text:c="2"/>? </text:p>
      <text:p text:style-name="P3">? <text:s text:c="2"/>??? models/ </text:p>
      <text:p text:style-name="P3">? <text:s text:c="2"/>? <text:s text:c="2"/>??? user.py </text:p>
      <text:p text:style-name="P3">? <text:s text:c="2"/>? <text:s text:c="2"/>??? resume.py </text:p>
      <text:p text:style-name="P3">? <text:s text:c="2"/>? <text:s text:c="2"/>??? experience.py </text:p>
      <text:p text:style-name="P3">? <text:s text:c="2"/>? <text:s text:c="2"/>??? education.py </text:p>
      <text:p text:style-name="P3">? <text:s text:c="2"/>? <text:s text:c="2"/>??? skills.py </text:p>
      <text:p text:style-name="P3"><text:soft-page-break/>? <text:s text:c="2"/>? <text:s text:c="2"/>??? projects.py </text:p>
      <text:p text:style-name="P3">? <text:s text:c="2"/>? </text:p>
      <text:p text:style-name="P3">? <text:s text:c="2"/>??? schemas/ </text:p>
      <text:p text:style-name="P3">? <text:s text:c="2"/>? <text:s text:c="2"/>??? user.py </text:p>
      <text:p text:style-name="P3">? <text:s text:c="2"/>? <text:s text:c="2"/>??? auth.py </text:p>
      <text:p text:style-name="P3">? <text:s text:c="2"/>? <text:s text:c="2"/>??? resume.py </text:p>
      <text:p text:style-name="P3">? <text:s text:c="2"/>? <text:s text:c="2"/>??? checker.py </text:p>
      <text:p text:style-name="P3">? <text:s text:c="2"/>? </text:p>
      <text:p text:style-name="P3">? <text:s text:c="2"/>??? services/ </text:p>
      <text:p text:style-name="P3">? <text:s text:c="2"/>? <text:s text:c="2"/>??? auth_service.py </text:p>
      <text:p text:style-name="P3">? <text:s text:c="2"/>? <text:s text:c="2"/>??? resume_service.py </text:p>
      <text:p text:style-name="P3">? <text:s text:c="2"/>? <text:s text:c="2"/>??? pdf_service.py </text:p>
      <text:p text:style-name="P3">? <text:s text:c="2"/>? <text:s text:c="2"/>??? parser_service.py </text:p>
      <text:p text:style-name="P3">? <text:s text:c="2"/>? <text:s text:c="2"/>??? checker_service.py </text:p>
      <text:p text:style-name="P3">? <text:s text:c="2"/>? <text:s text:c="2"/>??? ats_service.py </text:p>
      <text:p text:style-name="P3">? <text:s text:c="2"/>? <text:s text:c="2"/>??? ai_service.py </text:p>
      <text:p text:style-name="P3">? <text:s text:c="2"/>? </text:p>
      <text:p text:style-name="P3">? <text:s text:c="2"/>??? database/ </text:p>
      <text:p text:style-name="P3">? <text:s text:c="2"/>? <text:s text:c="2"/>??? database.py </text:p>
      <text:p text:style-name="P3">? <text:s text:c="2"/>? <text:s text:c="2"/>??? session.py </text:p>
      <text:p text:style-name="P3">? <text:s text:c="2"/>? <text:s text:c="2"/>??? migrations/ </text:p>
      <text:p text:style-name="P3">? <text:s text:c="2"/>? </text:p>
      <text:p text:style-name="P3">? <text:s text:c="2"/>??? auth/ </text:p>
      <text:p text:style-name="P3">? <text:s text:c="2"/>? <text:s text:c="2"/>??? jwt.py </text:p>
      <text:p text:style-name="P3">? <text:s text:c="2"/>? <text:s text:c="2"/>??? hashing.py </text:p>
      <text:p text:style-name="P3">? <text:s text:c="2"/>? <text:s text:c="2"/>??? dependencies.py </text:p>
      <text:p text:style-name="P3">? <text:s text:c="2"/>? </text:p>
      <text:p text:style-name="P3">? <text:s text:c="2"/>??? config/ </text:p>
      <text:p text:style-name="P3">? <text:s text:c="2"/>? <text:s text:c="2"/>??? settings.py </text:p>
      <text:p text:style-name="P3">? <text:s text:c="2"/>? <text:s text:c="2"/>??? logging.py </text:p>
      <text:p text:style-name="P3">? <text:s text:c="2"/>? </text:p>
      <text:p text:style-name="P3">? <text:s text:c="2"/>??? utils/ </text:p>
      <text:p text:style-name="P3">? <text:s text:c="2"/>? <text:s text:c="2"/>??? validators.py </text:p>
      <text:p text:style-name="P3">? <text:s text:c="2"/>? <text:s text:c="2"/>??? file_utils.py </text:p>
      <text:p text:style-name="P3">? <text:s text:c="2"/>? <text:s text:c="2"/>??? text_processing.py </text:p>
      <text:p text:style-name="P3">? <text:s text:c="2"/>? </text:p>
      <text:p text:style-name="P3">? <text:s text:c="2"/>??? main.py </text:p>
      <text:p text:style-name="P3">? </text:p>
      <text:p text:style-name="P3">??? tests/ </text:p>
      <text:p text:style-name="P3">? <text:s text:c="2"/>??? test_auth.py </text:p>
      <text:p text:style-name="P3">? <text:s text:c="2"/>??? test_resume.py </text:p>
      <text:p text:style-name="P3">? <text:s text:c="2"/>??? test_checker.py </text:p>
      <text:p text:style-name="P3">? <text:s text:c="2"/>??? test_parser.py </text:p>
      <text:p text:style-name="P3">? </text:p>
      <text:p text:style-name="P3">??? alembic/ </text:p>
      <text:p text:style-name="P3">? </text:p>
      <text:p text:style-name="P3"><text:soft-page-break/>??? requirements.txt </text:p>
      <text:p text:style-name="P3">??? .env </text:p>
      <text:p text:style-name="P3">??? .env.example </text:p>
      <text:p text:style-name="P3"/>
      <text:p text:style-name="P3">How a Request Flows </text:p>
      <text:p text:style-name="P3">Let's say a user logs in. </text:p>
      <text:p text:style-name="P3"/>
      <text:p text:style-name="P3">Frontend </text:p>
      <text:p text:style-name="P3">? </text:p>
      <text:p text:style-name="P3">??? Login.tsx </text:p>
      <text:p text:style-name="P3">? </text:p>
      <text:p text:style-name="P3">? </text:p>
      <text:p text:style-name="P3">authService.ts </text:p>
      <text:p text:style-name="P3">? </text:p>
      <text:p text:style-name="P3">? </text:p>
      <text:p text:style-name="P3">POST /login </text:p>
      <text:p text:style-name="P3">? </text:p>
      <text:p text:style-name="P3">Backend </text:p>
      <text:p text:style-name="P3">? </text:p>
      <text:p text:style-name="P3">? </text:p>
      <text:p text:style-name="P3">api/auth.py </text:p>
      <text:p text:style-name="P3">? </text:p>
      <text:p text:style-name="P3">? </text:p>
      <text:p text:style-name="P3">auth_service.py </text:p>
      <text:p text:style-name="P3">? </text:p>
      <text:p text:style-name="P3">? </text:p>
      <text:p text:style-name="P3">User Model </text:p>
      <text:p text:style-name="P3">? </text:p>
      <text:p text:style-name="P3">? </text:p>
      <text:p text:style-name="P3">PostgreSQL </text:p>
      <text:p text:style-name="P3"/>
      <text:p text:style-name="P3">Each layer has a clear responsibility: </text:p>
      <text:p text:style-name="P1"><text:span text:style-name="T1"><text:s text:c="4"/>Page: Displays the UI. <text:s/></text:span></text:p>
      <text:p text:style-name="P1"><text:span text:style-name="T1"><text:s text:c="4"/>Service (frontend): Sends the request. <text:s/></text:span></text:p>
      <text:p text:style-name="P1"><text:span text:style-name="T1"><text:s text:c="4"/>API route: Receives the request. <text:s/></text:span></text:p>
      <text:p text:style-name="P1"><text:span text:style-name="T1"><text:s text:c="4"/>Service (backend): Contains the business logic. <text:s/></text:span></text:p>
      <text:p text:style-name="P1"><text:span text:style-name="T1"><text:s text:c="4"/>Model: Represents the database. <text:s/></text:span></text:p>
      <text:p text:style-name="P1"><text:span text:style-name="T1"><text:s text:c="4"/>Database: Stores the data. </text:span></text:p>
      <text:p text:style-name="P1"><text:span text:style-name="T1"/></text:p>
      <text:p text:style-name="P3">This way, all the code for a feature lives together, making it easier to navigate as the application grows. Many modern FastAPI and larger production applications favor this organization because you spend less time jumping between directories when working on a specific feature. <text:s/></text:p>
      <text:p text:style-name="P3"/>
      <text:p text:style-name="P3"># Python</text:p>
      <text:p text:style-name="P3">__pycache__/</text:p>
      <text:p text:style-name="P3"><text:soft-page-break/>*.pyc</text:p>
      <text:p text:style-name="P3">.venv/</text:p>
      <text:p text:style-name="P3">venv/</text:p>
      <text:p text:style-name="P3">.env</text:p>
      <text:p text:style-name="P3"/>
      <text:p text:style-name="P3"># Node</text:p>
      <text:p text:style-name="P3">node_modules/</text:p>
      <text:p text:style-name="P3">dist/</text:p>
      <text:p text:style-name="P3"/>
      <text:p text:style-name="P3"># VS Code</text:p>
      <text:p text:style-name="P3">.vscode/</text:p>
      <text:p text:style-name="P3"/>
      <text:p text:style-name="P3"># macOS</text:p>
      <text:p text:style-name="P3">.DS_Store</text:p>
      <text:p text:style-name="P3"/>
      <text:p text:style-name="P3"># Windows</text:p>
      <text:p text:style-name="P3">Thumbs.db</text:p>
      <text:p text:style-name="P3"/>
      <text:p text:style-name="P3"># Logs</text:p>
      <text:p text:style-name="P3">*.log</text:p>
      <text:p text:style-name="P3"/>
      <text:p text:style-name="P3"># Coverage</text:p>
      <text:p text:style-name="P3">.coverage</text:p>
      <text:p text:style-name="P3">htmlcov/</text:p>
      <text:p text:style-name="P3"/>
      <text:p text:style-name="P3"># Build</text:p>
      <text:p text:style-name="P3">build/</text:p>
      <text:p text:style-name="P3"/>
      <text:p text:style-name="P3"># IDE</text:p>
      <text:p text:style-name="P3">.idea/</text:p>
      <text:p text:style-name="P3"/>
      <text:p text:style-name="P3"># Environment</text:p>
      <text:p text:style-name="P3">.env.loc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date>2026-07-01T05:58:00.173000000</dc:date>
    <meta:editing-duration>PT17M21S</meta:editing-duration>
    <meta:editing-cycles>1</meta:editing-cycles>
    <meta:document-statistic meta:table-count="0" meta:image-count="0" meta:object-count="0" meta:page-count="9" meta:paragraph-count="356" meta:word-count="1226" meta:character-count="7512" meta:non-whitespace-character-count="5602"/>
  </office:meta>
</office:document-meta>
</file>